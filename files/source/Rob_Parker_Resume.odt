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0555in" fo:margin-bottom="0.0555in" style:contextual-spacing="false"/>
    </style:style>
    <style:style style:name="P2" style:family="paragraph" style:parent-style-name="Standard">
      <style:paragraph-properties fo:margin-top="0in" fo:margin-bottom="0.028in" style:contextual-spacing="false">
        <style:tab-stops>
          <style:tab-stop style:position="6.5in" style:type="right"/>
        </style:tab-stops>
      </style:paragraph-properties>
    </style:style>
    <style:style style:name="P3" style:family="paragraph" style:parent-style-name="Standard">
      <style:paragraph-properties fo:margin-top="0in" fo:margin-bottom="0.0417in" style:contextual-spacing="false"/>
    </style:style>
    <style:style style:name="P4" style:family="paragraph" style:parent-style-name="Standard">
      <style:paragraph-properties fo:margin-top="0.0417in" fo:margin-bottom="0.028in" style:contextual-spacing="false"/>
    </style:style>
    <style:style style:name="P5" style:family="paragraph" style:parent-style-name="Standard">
      <style:paragraph-properties fo:margin-top="0.0209in" fo:margin-bottom="0.0209in" style:contextual-spacing="false"/>
    </style:style>
    <style:style style:name="P6" style:family="paragraph" style:parent-style-name="Standard">
      <style:paragraph-properties fo:margin-top="0in" fo:margin-bottom="0.0417in" style:contextual-spacing="false" fo:text-align="center" style:justify-single-word="false"/>
      <style:text-properties fo:color="#1f4e79" loext:opacity="100%" style:font-name="Arial" fo:font-size="20pt" fo:font-weight="bold" style:font-name-asian="Arial1" style:font-size-asian="20pt" style:font-weight-asian="bold" style:font-name-complex="Arial1" style:font-size-complex="20pt" style:font-weight-complex="bold"/>
    </style:style>
    <style:style style:name="P7" style:family="paragraph" style:parent-style-name="Standard">
      <style:paragraph-properties fo:margin-top="0.139in" fo:margin-bottom="0.0555in" style:contextual-spacing="false" fo:padding-left="0in" fo:padding-right="0in" fo:padding-top="0in" fo:padding-bottom="0.0138in" fo:border-left="none" fo:border-right="none" fo:border-top="none" fo:border-bottom="0.51pt solid #1f4e79"/>
      <style:text-properties fo:color="#1f4e79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8" style:family="paragraph" style:parent-style-name="Standard">
      <style:paragraph-properties fo:margin-top="0in" fo:margin-bottom="0.028in" style:contextual-spacing="false" fo:text-align="center" style:justify-single-word="false"/>
      <style:text-properties fo:color="#555555" loext:opacity="100%" style:font-name="Arial" fo:font-size="9pt" style:font-name-asian="Arial1" style:font-size-asian="9pt" style:font-name-complex="Arial1" style:font-size-complex="9pt"/>
    </style:style>
    <style:style style:name="P9" style:family="paragraph" style:parent-style-name="Standard">
      <style:paragraph-properties fo:margin-top="0.0972in" fo:margin-bottom="0in" style:contextual-spacing="false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0" style:family="paragraph" style:parent-style-name="Standard">
      <style:paragraph-properties fo:margin-top="0.0693in" fo:margin-bottom="0.0138in" style:contextual-spacing="false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11" style:family="paragraph" style:parent-style-name="Standard">
      <style:paragraph-properties fo:margin-top="0in" fo:margin-bottom="0.0417in" style:contextual-spacing="false"/>
      <style:text-properties style:font-name="Arial" fo:font-size="10pt" style:font-name-asian="Arial1" style:font-size-asian="10pt" style:font-name-complex="Arial1" style:font-size-complex="10pt"/>
    </style:style>
    <style:style style:name="P12" style:family="paragraph" style:parent-style-name="List_20_Paragraph" style:list-style-name="WWNum2">
      <style:paragraph-properties fo:margin-top="0.0138in" fo:margin-bottom="0.0138in" style:contextual-spacing="false"/>
      <style:text-properties style:font-name="Arial" fo:font-size="10pt" style:font-name-asian="Arial1" style:font-size-asian="10pt" style:font-name-complex="Arial1" style:font-size-complex="10pt"/>
    </style:style>
    <style:style style:name="T1" style:family="text">
      <style:text-properties fo:color="#1f4e79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2" style:family="text">
      <style:text-properties fo:color="#555555" loext:opacity="100%" style:font-name="Arial" fo:font-size="10pt" style:font-name-asian="Arial1" style:font-size-asian="10pt" style:font-name-complex="Arial1" style:font-size-complex="10pt"/>
    </style:style>
    <style:style style:name="T3" style:family="text">
      <style:text-properties style:font-name="Arial" fo:font-size="10pt" style:font-name-asian="Arial1" style:font-size-asian="10pt" style:font-name-complex="Arial1" style:font-size-complex="10pt"/>
    </style:style>
    <style:style style:name="T4" style:family="text">
      <style:text-properties style:font-name="Arial" fo:font-size="10pt" officeooo:rsid="0015ec88" style:font-name-asian="Arial1" style:font-size-asian="10pt" style:font-name-complex="Arial1" style:font-size-complex="10pt"/>
    </style:style>
    <style:style style:name="T5" style:family="text"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OB PARKER</text:p>
      <text:p text:style-name="P8">Decatur, Georgia <text:s/>| <text:s/>rob.c.parker@gmail.com <text:s/>| <text:s/>678-613-4696 <text:s/>| <text:s/>linkedin.com/in/robcparker</text:p>
      <text:p text:style-name="P7">SUMMARY</text:p>
      <text:p text:style-name="P1"><text:span text:style-name="T3">Technology executive with 25+ years of engineering experience, including 10+ years in senior leadership roles at B2B SaaS companies, architecting scalable </text:span><text:span text:style-name="T4">products</text:span><text:span text:style-name="T3"> and building high-performance distributed development teams. Most recently, directed teams that built and shipped SugarAI’s multi-tenant AI platform on AWS Bedrock, spanning AI/ML, Data Platform, and Identity Management. Track record of scaling engineering organizations while delivering measurable outcomes: 350% increase in system throughput, 25% cost reduction, and 20% increase in developer velocity through AI enablement to scale toward agentic development workflows. Prior experience as CTO at Salesfusion; led the technical track of acquisition by SugarCRM. Targeting Director or VP of Engineering roles at AI-forward companies.</text:span></text:p>
      <text:p text:style-name="P7">EXPERIENCE</text:p>
      <text:p text:style-name="P9">Senior Director of Engineering</text:p>
      <text:p text:style-name="P2"><text:span text:style-name="T1">SugarAI (formerly SugarCRM)</text:span><text:span text:style-name="T2"><text:tab/>January 2021 – March 2026 <text:s/>| <text:s/>Atlanta, GA</text:span></text:p>
      <text:list text:style-name="WWNum2">
        <text:list-item text:start-value="1">
          <text:p text:style-name="P12">Led AI-native platform engineering and data science teams for $100M+ SaaS CRM company (500 employees), managing a global organization of 26 engineers through 5 managers.</text:p>
        </text:list-item>
        <text:list-item>
          <text:p text:style-name="P12">Led the design and delivery of a multi-tenant AI platform on AWS Bedrock through beta release, encompassing RAG pipelines, agent orchestration, prompt management, and LLM observability across the SugarAI product suite.</text:p>
        </text:list-item>
        <text:list-item>
          <text:p text:style-name="P12">Built a three-tier AI adoption framework and drove GitHub Copilot deployment across the engineering organization, delivering a measured 20% increase in developer velocity; established evaluation and governance infrastructure for expanded GAI tooling to scale toward agentic workflows.</text:p>
        </text:list-item>
        <text:list-item>
          <text:p text:style-name="P12">Led modernization from monolithic .NET to containerized Python microservices and AWS serverless architecture (ECS, Lambda, Step Functions), increasing system throughput by 350% while reducing infrastructure costs by 25%.</text:p>
        </text:list-item>
        <text:list-item>
          <text:p text:style-name="P12">Delivered complex, multi-team product roadmaps on time and within budget, driving 17+ major releases annually with less than 10% sprint variance and 5% carryover.</text:p>
        </text:list-item>
        <text:list-item>
          <text:p text:style-name="P12">Scaled global engineering organization by 150%, with 90% retention; mentored 8 engineers into senior/staff roles and promoted 3 to engineering manager positions.</text:p>
        </text:list-item>
        <text:list-item>
          <text:p text:style-name="P12">Maintained an 80% DX developer experience score, measuring and sustaining engineering team health through a period of rapid organizational growth.</text:p>
        </text:list-item>
        <text:list-item>
          <text:p text:style-name="P12">Implemented quality-first engineering with automated testing frameworks (Cypress, Virtuoso, PyTest) achieving 90% code coverage across critical platform components.</text:p>
        </text:list-item>
        <text:list-item>
          <text:p text:style-name="P12">Drove platform integration strategy unifying disparate systems into cohesive CRM ecosystem, supporting a 25% improvement in customer retention metrics.</text:p>
        </text:list-item>
        <text:list-item>
          <text:p text:style-name="P12">Managed $2M annual engineering budget and P&amp;L responsibility for platform infrastructure, optimizing cloud spend and vendor contracts.</text:p>
        </text:list-item>
      </text:list>
      <text:p text:style-name="P9">Director of Engineering</text:p>
      <text:p text:style-name="P2"><text:span text:style-name="T1">SugarAI (formerly SugarCRM)</text:span><text:span text:style-name="T2"><text:tab/>May 2019 – January 2021 <text:s/>| <text:s/>Atlanta, GA</text:span></text:p>
      <text:list text:continue-numbering="true" text:style-name="WWNum2">
        <text:list-item>
          <text:p text:style-name="P12">Transitioned directly from CTO of acquired Salesfusion into this role to lead the full technology integration, owning the roadmap for a 12-person engineering team and 300+ B2B customer accounts.</text:p>
        </text:list-item>
        <text:list-item>
          <text:p text:style-name="P12">Migrated the Salesfusion platform to SugarCRM infrastructure within 6 months, unifying code repositories, CI/CD pipelines, and deployment processes across both organizations, achieving 100% of integration milestones on schedule.</text:p>
        </text:list-item>
        <text:list-item>
          <text:p text:style-name="P12">Maintained product velocity and team stability throughout the acquisition, achieving 92% employee retention during the transition.</text:p>
        </text:list-item>
      </text:list>
      <text:p text:style-name="P9">Chief Technology Officer</text:p>
      <text:p text:style-name="P2"><text:span text:style-name="T1">Salesfusion</text:span><text:span text:style-name="T2"><text:tab/>January 2019 – May 2019 <text:s/>| <text:s/>Atlanta, GA</text:span></text:p>
      <text:list text:continue-numbering="true" text:style-name="WWNum2">
        <text:list-item>
          <text:p text:style-name="P12">Served as CTO through SugarCRM’s acquisition of Salesfusion; led the full technical track of the transaction, defining the organization integration strategy and technical roadmap. Completed org integration on schedule in 12 weeks with zero customer churn.</text:p>
        </text:list-item>
        <text:list-item>
          <text:p text:style-name="P12">Built and executed technical roadmap for platform scalability, security hardening, and performance improvements, achieving SOC 2 Type II and ISO 27001 certification, significantly improving platform <text:soft-page-break/>response times, and maintaining 99.95% uptime SLA.</text:p>
        </text:list-item>
        <text:list-item>
          <text:p text:style-name="P12">Managed 12-person engineering team across frontend (Angular), backend (Python), and DevOps disciplines.</text:p>
        </text:list-item>
      </text:list>
      <text:p text:style-name="P9">Director of Engineering / Lead Software Engineer</text:p>
      <text:p text:style-name="P2"><text:span text:style-name="T1">Salesfusion</text:span><text:span text:style-name="T2"><text:tab/>November 2015 – January 2019 <text:s/>| <text:s/>Atlanta, GA</text:span></text:p>
      <text:list text:continue-numbering="true" text:style-name="WWNum2">
        <text:list-item>
          <text:p text:style-name="P12">Advanced from Lead Software Engineer to Director of Engineering, demonstrating strong technical and leadership capabilities.</text:p>
        </text:list-item>
        <text:list-item>
          <text:p text:style-name="P12">Established development methodologies (Agile/Scrum), code quality standards (80% test coverage), and technical best practices, improving deployment frequency from quarterly to bi-weekly.</text:p>
        </text:list-item>
        <text:list-item>
          <text:p text:style-name="P12">Architected marketing automation features processing 2M+ emails daily.</text:p>
        </text:list-item>
      </text:list>
      <text:p text:style-name="P7">EARLIER EXPERIENCE</text:p>
      <text:p text:style-name="P10">Senior Software Engineer / Technical Team Lead — athenahealth (2015)</text:p>
      <text:p text:style-name="P11">Led re-platforming of an acquired EHR system with 50,000+ users to private cloud, improving deployment frequency from monthly to weekly and reducing MTTR from 4 hours to 45 minutes.</text:p>
      <text:p text:style-name="P10">Software Architect / Systems Team Lead — M2SYS Technology</text:p>
      <text:p text:style-name="P11">Architected an enterprise biometric identity platform scaled to 80M+ records, supporting fingerprint, iris, and vascular recognition across healthcare and government organizations with 99.99% availability.</text:p>
      <text:p text:style-name="P10">Senior Software Engineer — Qcept Technologies</text:p>
      <text:p text:style-name="P11">Designed semiconductor metrology software for sub-100nm wafer defect detection, improving inspection throughput and significantly reducing false positive rates.</text:p>
      <text:p text:style-name="P10">Senior Software Engineer — Cisco Systems</text:p>
      <text:p text:style-name="P11">Built embedded middleware for multi-tuner set-top boxes managing 6 concurrent HD streams across 2M+ deployed cable operator devices.</text:p>
      <text:p text:style-name="P7">EDUCATION</text:p>
      <text:p text:style-name="P4"><text:span text:style-name="T5">Master of Science, Computer Science</text:span><text:span text:style-name="T2"> <text:s/>— <text:s/>Georgia Institute of Technology</text:span></text:p>
      <text:p text:style-name="P3"><text:span text:style-name="T5">Bachelor of Science, Computer Information Systems</text:span><text:span text:style-name="T2"> <text:s/>— <text:s/>Clemson University</text:span></text:p>
      <text:p text:style-name="P7">SKILLS</text:p>
      <text:p text:style-name="P5"><text:span text:style-name="T5">AI &amp; Platform: </text:span><text:span text:style-name="T3">AWS Bedrock, RAG Pipeline Design, LLM Evaluation, Agentic Frameworks (LangGraph, CrewAI), Multi-Tenant SaaS Platforms, AI Observability &amp; Cost Governance, Prompt Management</text:span></text:p>
      <text:p text:style-name="P5"><text:span text:style-name="T5">Cloud &amp; Architecture: </text:span><text:span text:style-name="T3">Cloud-Native Architecture, Microservices, Serverless Computing, AWS (ECS, Lambda, Step Functions, DynamoDB), DevOps &amp; CI/CD, Site Reliability Engineering, Performance Optimization</text:span></text:p>
      <text:p text:style-name="P5"><text:span text:style-name="T5">Engineering Leadership: </text:span><text:span text:style-name="T3">Executive Engineering Leadership, Team Scaling &amp; Retention, Technical Mentorship, Strategic Planning, Cross-Functional Collaboration, Stakeholder Management, Change Management, M&amp;A Technical Due Diligence, Budget &amp; P&amp;L Management</text:span></text:p>
      <text:p text:style-name="P5"><text:span text:style-name="T5">Development: </text:span><text:span text:style-name="T3">Roadmap Planning &amp; Execution, Product Delivery, Automated Testing (Cypress, Virtuoso, PyTest), API &amp; Systems Integration, Data Engineering &amp; ETL Pipelines, Agile &amp; Scrum Methodologi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Noto Sans Devanaga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Noto Sans Devanaga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0.333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5</meta:editing-cycles>
    <meta:creation-date>2026-04-01T03:23:35.141000000</meta:creation-date>
    <dc:date>2026-04-04T21:47:14.387968091</dc:date>
    <meta:editing-duration>PT14M14S</meta:editing-duration>
    <meta:generator>LibreOffice/24.2.7.2$Linux_X86_64 LibreOffice_project/420$Build-2</meta:generator>
    <meta:document-statistic meta:table-count="0" meta:image-count="0" meta:object-count="0" meta:page-count="2" meta:paragraph-count="48" meta:word-count="839" meta:character-count="6371" meta:non-whitespace-character-count="5570"/>
  </office:meta>
</office:document-meta>
</file>